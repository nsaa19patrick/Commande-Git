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b81" officeooo:paragraph-rsid="0015f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1:04:45.460328575</meta:creation-date>
    <dc:date>2026-06-14T11:05:44.567796328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