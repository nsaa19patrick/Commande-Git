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b81" officeooo:paragraph-rsid="0015f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1:04:45.460328575</meta:creation-date>
    <dc:date>2026-06-16T15:20:39.123052402</dc:date>
    <meta:editing-duration>PT1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