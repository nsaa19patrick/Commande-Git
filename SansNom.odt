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04e" officeooo:paragraph-rsid="001b9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gvbrg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5:16:56.142172057</meta:creation-date>
    <dc:date>2026-06-18T15:17:20.733388478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7.3.7.2$Linux_X86_64 LibreOffice_project/30$Build-2</meta:generator>
  </office:meta>
</office:document-meta>
</file>